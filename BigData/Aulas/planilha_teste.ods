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office:value-type="float" office:value="2.3" calcext:value-type="float">
            <text:p>2,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office:value-type="float" office:value="3.5" calcext:value-type="float">
            <text:p>3,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office:value-type="float" office:value="7.5" calcext:value-type="float">
            <text:p>7,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so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so8</text:p>
          </table:table-cell>
          <table:table-cell office:value-type="float" office:value="8.5" calcext:value-type="float">
            <text:p>8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so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so1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21:16:30.282000000</meta:creation-date>
    <dc:date>2023-10-22T21:19:07.468000000</dc:date>
    <meta:editing-duration>PT2M37S</meta:editing-duration>
    <meta:editing-cycles>1</meta:editing-cycles>
    <meta:document-statistic meta:table-count="1" meta:cell-count="32" meta:object-count="0"/>
    <meta:generator>LibreOffice/7.5.2.2$Windows_X86_64 LibreOffice_project/53bb9681a964705cf672590721dbc85eb4d0c3a2</meta:generator>
  </office:meta>
</office:document-meta>
</file>